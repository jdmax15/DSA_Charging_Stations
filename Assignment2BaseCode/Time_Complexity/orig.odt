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text-properties fo:font-weight="bold" officeooo:paragraph-rsid="00160bc3" style:font-weight-asian="bold" style:font-weight-complex="bold"/>
    </style:style>
    <style:style style:name="P4" style:family="paragraph" style:parent-style-name="Text_20_body" style:list-style-name="L3">
      <style:text-properties officeooo:paragraph-rsid="00160bc3"/>
    </style:style>
    <style:style style:name="P5" style:family="paragraph" style:parent-style-name="Text_20_body">
      <style:text-properties officeooo:paragraph-rsid="00160bc3"/>
    </style:style>
    <style:style style:name="P6" style:family="paragraph" style:parent-style-name="Text_20_body" style:list-style-name="L4"/>
    <style:style style:name="P7" style:family="paragraph" style:parent-style-name="Preformatted_20_Text">
      <style:paragraph-properties fo:margin-top="0cm" fo:margin-bottom="0.499cm" style:contextual-spacing="false"/>
    </style:style>
    <style:style style:name="P8" style:family="paragraph" style:parent-style-name="Text_20_body" style:list-style-name="L5"/>
    <style:style style:name="P9" style:family="paragraph" style:parent-style-name="Text_20_body" style:list-style-name="L6"/>
    <style:style style:name="T1" style:family="text">
      <style:text-properties officeooo:rsid="00193c8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MP2009 Assignment 2 - Complexity Analysis</text:h>
      <text:list text:style-name="L1">
        <text:list-item>
          <text:p text:style-name="P1">Introduction</text:p>
        </text:list-item>
      </text:list>
      <text:p text:style-name="Horizontal_20_Line"/>
      <text:p text:style-name="Text_20_body">This program models an electric vehicle charging network across the Sydney metropolitan area. Locations are represented as vertices in a weighted graph, with edge weights representing the distances between adjacent locations in kilometres. The program allows a user to query the network to find charging stations based on proximity and cost, helping EV drivers make informed decisions about where to charge.</text:p>
      <text:list text:style-name="L2">
        <text:list-item>
          <text:p text:style-name="P2">Data Structures</text:p>
        </text:list-item>
      </text:list>
      <text:p text:style-name="Horizontal_20_Line"/>
      <text:list text:style-name="L3">
        <text:list-item>
          <text:p text:style-name="P3">double **weights </text:p>
          <text:p text:style-name="P4">A dynamically allocated 2D array of size n x n, where weights[i][j] stores the distance in kilometres between location i and location j. If two locations are not directly connected, the value is set to DBL_MAX to represent infinity. This allows O(1) lookup of any edge weight and is used in Dijkstra's algorithm during the relaxation step.</text:p>
        </text:list-item>
        <text:list-item>
          <text:p text:style-name="P3">List&lt;<text:span text:style-name="T1">int&gt;</text:span> *graph </text:p>
          <text:p text:style-name="P4">A dynamically allocated array of n linked lists, where each index corresponds to a location. graph[i] contains a linked list of the indices of all locations directly connected to location i. When the graph is loaded, every non-zero weight between i and j results in j being appended to graph[i]'s list. This allows efficient traversal of only a node's direct neighbours and is used in Task 4 to find adjacent charging stations.</text:p>
        </text:list-item>
        <text:list-item>
          <text:p text:style-name="P3">map&lt;int, Location&gt; locations </text:p>
          <text:p text:style-name="P4">A sorted associative container mapping an integer index to a Location object. Each Location stores the location name, whether a charger is installed, and the charging price per kWh. Using a map allows locations to be looked up by index in O(log n) time and ensures entries are always stored in key order.</text:p>
        </text:list-item>
        <text:list-item>
          <text:p text:style-name="P3">double *smallestWeight </text:p>
          <text:p text:style-name="P4">A dynamically allocated 1D array of size n. After calling shortestPath(source), smallestWeight[i] holds the shortest known distance from the source vertex to vertex i. It is initialised from the source row of the weights matrix and updated throughout Dijkstra's algorithm as shorter paths are discovered.</text:p>
        </text:list-item>
        <text:list-item>
          <text:p text:style-name="P3">int *prev </text:p>
          <text:p text:style-name="P4">A dynamically allocated 1D array of size n. prev[i] stores the index of the vertex that immediately precedes vertex i on the shortest path from the source. Initialised to -1 for all nodes, then set to the source for direct neighbours, and updated during relaxation. After shortestPath runs, this array is traced backwards from any node to reconstruct the full path, used in Tasks 7 and 8.</text:p>
          <text:p text:style-name="P4"/>
        </text:list-item>
        <text:list-item>
          <text:p text:style-name="P3"><text:soft-page-break/>vector stations </text:p>
          <text:p text:style-name="P4">A dynamically resizable array used temporarily in Task 3. All locations with a charger installed are copied into this vector, which is then sorted in place using STL sort. Vectors support random access and are compatible with STL algorithms, making them well suited for this sorting operation.</text:p>
        </text:list-item>
        <text:list-item>
          <text:p text:style-name="P3">stack </text:p>
          <text:p text:style-name="P4">A last-in first-out container used in Tasks 7 and 8 during path reconstruction. Nodes are pushed onto the stack while tracing backwards from a charging station to the origin using the prev array. Popping them off then produces the path in the correct forward order without needing a separate reversal step.</text:p>
        </text:list-item>
      </text:list>
      <text:p text:style-name="P5"/>
      <text:p text:style-name="P5"/>
      <text:list text:style-name="L4">
        <text:list-item>
          <text:p text:style-name="P6">Algorithms</text:p>
        </text:list-item>
      </text:list>
      <text:p text:style-name="Horizontal_20_Line"/>
      <text:p text:style-name="Text_20_body">Algorithm 1 - Sort stations by price (Task 3)</text:p>
      <text:p text:style-name="P7">collect all locations where chargerInstalled == true into a vector<text:line-break/>sort the vector using STL sort with operator&lt; on chargingPrice<text:line-break/>print each location in sorted order</text:p>
      <text:p text:style-name="Text_20_body">Algorithm 2 - Dijkstra's shortest path (Tasks 5, 6, 7, 8)</text:p>
      <text:p text:style-name="P7">initialise smallestWeight[j] = weights[source][j] for all j<text:line-break/>initialise prev[j] = source for all direct neighbours, else -1<text:line-break/>initialise weightFound[j] = false for all j<text:line-break/>set weightFound[source] = true, smallestWeight[source] = 0<text:line-break/><text:line-break/>repeat n-1 times:<text:line-break/> <text:s text:c="3"/>find unvisited vertex v with minimum smallestWeight<text:line-break/> <text:s text:c="3"/>mark v as visited<text:line-break/> <text:s text:c="3"/>for each unvisited neighbour j of v:<text:line-break/> <text:s text:c="7"/>if smallestWeight[v] + weights[v][j] &lt; smallestWeight[j]:<text:line-break/> <text:s text:c="11"/>update smallestWeight[j]<text:line-break/> <text:s text:c="11"/>set prev[j] = v</text:p>
      <text:p text:style-name="Text_20_body">Algorithm 3 - Find cheapest path with one charging stop (Task 7)</text:p>
      <text:p text:style-name="P7">run Dijkstra from origin <text:s text:c="5"/>-&gt; save dist1[], prev1[]<text:line-break/>run Dijkstra from destination -&gt; save dist2[], prev2[]<text:line-break/><text:line-break/>for each valid charging station i:<text:line-break/> <text:s text:c="3"/>cost = (dist1[i] + dist2[i]) * 0.10 + kWh * price[i]<text:line-break/> <text:s text:c="3"/>track minimum cost and best station<text:line-break/><text:line-break/>reconstruct path:<text:line-break/> <text:s text:c="3"/>trace prev1 from best station back to origin using a stack<text:line-break/> <text:s text:c="3"/>trace prev2 from best station forward to destination using a vector<text:line-break/>print combined path and cost breakdown</text:p>
      <text:list text:style-name="L5">
        <text:list-item>
          <text:p text:style-name="P8">Complexity Analysis</text:p>
        </text:list-item>
      </text:list>
      <text:p text:style-name="Horizontal_20_Line"/>
      <text:p text:style-name="Text_20_body"><text:soft-page-break/>Algorithm 1 - O(n log n)</text:p>
      <text:p text:style-name="Text_20_body">Collecting stations with chargers requires iterating over all n locations, which is O(n). STL sort on a vector of size k &lt;= n is O(k log k), which in the worst case is O(n log n). The overall complexity is O(n log n).</text:p>
      <text:p text:style-name="Text_20_body">Algorithm 2 - O(n^2)</text:p>
      <text:p text:style-name="Text_20_body">The outer loop runs n-1 times. Inside each iteration, finding the unvisited vertex with the minimum distance scans all n vertices, which is O(n). Relaxing the neighbours of that vertex also scans all n vertices, which is O(n). The total complexity is O(n * 2n) = O(n^2).</text:p>
      <text:p text:style-name="Text_20_body">Algorithm 3 - O(n^2)</text:p>
      <text:p text:style-name="Text_20_body">Two calls to Dijkstra's algorithm each cost O(n^2). The scan over all stations to find the minimum cost stop is O(n). Path reconstruction traces at most n nodes in each segment, which is O(n). The dominant term is the two Dijkstra runs, giving an overall complexity of O(n^2).</text:p>
      <text:list text:style-name="L6">
        <text:list-item>
          <text:p text:style-name="P9">Conclusion</text:p>
        </text:list-item>
      </text:list>
      <text:p text:style-name="Horizontal_20_Line"/>
      <text:p text:style-name="Text_20_body">This program implements a weighted graph to model the Sydney EV charging network, supporting a range of queries from finding adjacent stations to computing optimal charging paths. Dijkstra's algorithm is the core of the most significant tasks, extended with predecessor tracking to enable full path reconstruction. The sorting, shortest path, and optimal path algorithms together demonstrate practical application of graph data structures and greedy search techniques.</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9T20:33:57.588839828</meta:creation-date>
    <dc:date>2026-05-19T22:26:28.375422911</dc:date>
    <meta:editing-duration>PT1H10M8S</meta:editing-duration>
    <meta:editing-cycles>5</meta:editing-cycles>
    <meta:generator>LibreOffice/26.2.3.2$Linux_X86_64 LibreOffice_project/ca14918b0fa569b9db704e10d20c5d2a5a16ac6d</meta:generator>
    <meta:document-statistic meta:table-count="0" meta:image-count="0" meta:object-count="0" meta:page-count="3" meta:paragraph-count="35" meta:word-count="909" meta:character-count="5575" meta:non-whitespace-character-count="4645"/>
  </office:meta>
</office:document-meta>
</file>