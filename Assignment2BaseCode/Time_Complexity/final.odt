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5d33" officeooo:paragraph-rsid="00055d33"/>
    </style:style>
    <style:style style:name="P2" style:family="paragraph" style:parent-style-name="Standard">
      <style:text-properties officeooo:rsid="0006a6cd" officeooo:paragraph-rsid="0006a6cd"/>
    </style:style>
    <style:style style:name="P3" style:family="paragraph" style:parent-style-name="Text_20_body" style:list-style-name="L1">
      <style:text-properties fo:font-weight="bold" officeooo:paragraph-rsid="000b11ce" style:font-weight-asian="bold" style:font-weight-complex="bold"/>
    </style:style>
    <style:style style:name="P4" style:family="paragraph" style:parent-style-name="Standard" style:list-style-name="L1">
      <style:text-properties officeooo:rsid="0006a6cd" officeooo:paragraph-rsid="000b11ce"/>
    </style:style>
    <style:style style:name="P5" style:family="paragraph" style:parent-style-name="Text_20_body">
      <style:text-properties officeooo:paragraph-rsid="000ccc7b"/>
    </style:style>
    <style:style style:name="P6" style:family="paragraph" style:parent-style-name="Text_20_body">
      <style:text-properties officeooo:paragraph-rsid="000b11ce"/>
    </style:style>
    <style:style style:name="P7" style:family="paragraph" style:parent-style-name="Text_20_body" style:list-style-name="L1">
      <style:text-properties officeooo:rsid="0012702a" officeooo:paragraph-rsid="0012702a"/>
    </style:style>
    <style:style style:name="P8" style:family="paragraph" style:parent-style-name="Text_20_body" style:list-style-name="L1">
      <style:text-properties officeooo:rsid="001578fe" officeooo:paragraph-rsid="001578fe"/>
    </style:style>
    <style:style style:name="P9" style:family="paragraph" style:parent-style-name="Text_20_body">
      <style:text-properties officeooo:rsid="001578fe" officeooo:paragraph-rsid="001578fe"/>
    </style:style>
    <style:style style:name="T1" style:family="text">
      <style:text-properties officeooo:rsid="0006a6cd"/>
    </style:style>
    <style:style style:name="T2" style:family="text">
      <style:text-properties officeooo:rsid="000b11ce"/>
    </style:style>
    <style:style style:name="T3" style:family="text">
      <style:text-properties officeooo:rsid="000bf2c0"/>
    </style:style>
    <style:style style:name="T4" style:family="text">
      <style:text-properties officeooo:rsid="000ccc7b"/>
    </style:style>
    <style:style style:name="T5" style:family="text">
      <style:text-properties officeooo:rsid="000ddcd8"/>
    </style:style>
    <style:style style:name="T6" style:family="text">
      <style:text-properties officeooo:rsid="000f9b18"/>
    </style:style>
    <style:style style:name="T7" style:family="text">
      <style:text-properties officeooo:rsid="00103b7b"/>
    </style:style>
    <style:style style:name="T8" style:family="text">
      <style:text-properties officeooo:rsid="0011232a"/>
    </style:style>
    <style:style style:name="T9" style:family="text">
      <style:text-properties officeooo:rsid="001265f2"/>
    </style:style>
    <style:style style:name="T10" style:family="text">
      <style:text-properties officeooo:rsid="00134500"/>
    </style:style>
    <style:style style:name="T11" style:family="text">
      <style:text-properties officeooo:rsid="0014443e"/>
    </style:style>
    <style:style style:name="T12" style:family="text">
      <style:text-properties officeooo:rsid="0016a01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2009 – Data Structures and Algorithms</text:p>
      <text:p text:style-name="P1">Assignment 2 Complexity Analysis</text:p>
      <text:p text:style-name="P1"/>
      <text:p text:style-name="P1">Joel Maxwell – 22173818</text:p>
      <text:p text:style-name="P1"/>
      <text:p text:style-name="P1"/>
      <text:p text:style-name="P1">1. Introduction</text:p>
      <text:p text:style-name="P1"/>
      <text:p text:style-name="P1">Assignment 2 is based on an EV Charging network based in the Sydney region. The network is represented as a weighted graph where the vertices are locations of suburbs and the edge weights are the distances between vertices in kilometers. Each of the vertices have data associated with them such as if a charger exists or not and the price per KW to charge. The program will be able to solve calculations such as finding the nearest charger, finding the cheapest nearby charger or navigating the cheapest path while taking a required charging amount into consideration.</text:p>
      <text:p text:style-name="P1"/>
      <text:p text:style-name="P1">2. Data Structures</text:p>
      <text:p text:style-name="P1"/>
      <text:p text:style-name="P1">- <text:span text:style-name="T1">2D array weights[n][n]</text:span></text:p>
      <text:p text:style-name="P2"/>
      <text:p text:style-name="P2"/>
      <text:list text:style-name="L1">
        <text:list-item>
          <text:p text:style-name="P3">double **weights </text:p>
          <text:p text:style-name="P4">“weights” represents the adjacency matrix which stores the distance between locations. DBL_MAX is used when there is no adjacency between 2 nodes. <text:span text:style-name="T2">It is a 2D array.</text:span></text:p>
          <text:p text:style-name="P4"/>
        </text:list-item>
        <text:list-item>
          <text:p text:style-name="P3"><text:span text:style-name="T3">l</text:span>ist&lt;<text:span text:style-name="T3">int&gt;</text:span> *graph </text:p>
        </text:list-item>
      </text:list>
      <text:p text:style-name="P5"><text:tab/><text:span text:style-name="T4">Graph is a pointer to a</text:span><text:span text:style-name="T3">n array of linked lists </text:span><text:span text:style-name="T5">where each index of the array represents a <text:tab/>location and the nodes in the linked list represent the adjacent locations. It is</text:span><text:span text:style-name="T4"> dynamically <text:tab/>allocated with “graph = new list&lt;int&gt;[gSize];” </text:span><text:span text:style-name="T5">where “gSize” </text:span><text:span text:style-name="T6">is the number of locations.</text:span></text:p>
      <text:list text:continue-numbering="true" text:style-name="L1">
        <text:list-item>
          <text:p text:style-name="P3">map&lt;int, Location&gt; locations </text:p>
        </text:list-item>
      </text:list>
      <text:p text:style-name="P6"><text:tab/><text:span text:style-name="T6">A map which links an integer index as a key, to a data value of a location object. Location <text:tab/>objects hole the location’s name, if it has a charger and the price of charing.</text:span></text:p>
      <text:p text:style-name="P6"/>
      <text:list text:continue-numbering="true" text:style-name="L1">
        <text:list-item>
          <text:p text:style-name="P3">double *smallestWeight </text:p>
        </text:list-item>
      </text:list>
      <text:p text:style-name="P6"><text:tab/><text:span text:style-name="T7">An array of size n that is dynamically allocated, based off the number of locations. Each <text:tab/>index stores the shortest distance from the source vertex to the location after running <text:tab/>shortestPat</text:span><text:span text:style-name="T8">h (which does this with Djikstra’s Algorithm). </text:span><text:span text:style-name="T9">It gets updated as shorter paths are <text:tab/>discovered.</text:span></text:p>
      <text:p text:style-name="P6"/>
      <text:list text:continue-numbering="true" text:style-name="L1">
        <text:list-item>
          <text:p text:style-name="P3">int *prev </text:p>
          <text:p text:style-name="P7">An array of size n that is dynamically allocated, where each index <text:span text:style-name="T10">is initially set to -1. After shortestPath is run, each index is updated to </text:span>contain the previous location’s index that shortestPath took to reach it. <text:span text:style-name="T10">To reach a specific destination in the shortest distance, go to that index and trace backwards, going to each index until -1 is returned, meaning the source is reached. Used in tasks 7 and 8.</text:span> </text:p>
        </text:list-item>
      </text:list>
      <text:p text:style-name="P6"><text:soft-page-break/></text:p>
      <text:list text:continue-numbering="true" text:style-name="L1">
        <text:list-item>
          <text:p text:style-name="P3">vector stations </text:p>
        </text:list-item>
      </text:list>
      <text:p text:style-name="P6"><text:tab/><text:span text:style-name="T10">A resizeable array thats used in task 3. All locations with a charger are added into the vector <text:tab/></text:span><text:span text:style-name="T11">which are sorted in place using Sort() from the C++ STL.</text:span></text:p>
      <text:p text:style-name="P6"/>
      <text:list text:continue-numbering="true" text:style-name="L1">
        <text:list-item>
          <text:p text:style-name="P3"><text:span text:style-name="T11">s</text:span>tack&lt;<text:span text:style-name="T11">int&gt; pathToStation</text:span></text:p>
          <text:p text:style-name="P8">The path of locations from the prev array are pushed onto this stack. To produce the path in the correct order, they can just be popped off and save needing a sepparate reversal step.</text:p>
        </text:list-item>
      </text:list>
      <text:p text:style-name="P9"/>
      <text:p text:style-name="P9">Algorithms</text:p>
      <text:p text:style-name="P9"><text:s/></text:p>
      <text:p text:style-name="P9">sortLocations()</text:p>
      <text:p text:style-name="P9"/>
      <text:p text:style-name="P9">For each location:</text:p>
      <text:p text:style-name="P9"><text:tab/>If there is a charger installed {</text:p>
      <text:p text:style-name="P9"><text:tab/><text:tab/>push location onto vector</text:p>
      <text:p text:style-name="P9"><text:tab/>}</text:p>
      <text:p text:style-name="P9">STL sort() on the vector of locations, with operator &lt; on chargingPrice.</text:p>
      <text:p text:style-name="P9"/>
      <text:p text:style-name="P9">shortestPath<text:span text:style-name="T12">(int vertex)</text:span></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9T20:35:15.091146229</meta:creation-date>
    <dc:date>2026-05-20T14:34:40.506223312</dc:date>
    <meta:editing-duration>PT28M50S</meta:editing-duration>
    <meta:editing-cycles>4</meta:editing-cycles>
    <meta:generator>LibreOffice/26.2.3.2$Linux_X86_64 LibreOffice_project/ca14918b0fa569b9db704e10d20c5d2a5a16ac6d</meta:generator>
    <meta:document-statistic meta:table-count="0" meta:image-count="0" meta:object-count="0" meta:page-count="2" meta:paragraph-count="31" meta:word-count="461" meta:character-count="2717" meta:non-whitespace-character-count="2271"/>
  </office:meta>
</office:document-meta>
</file>